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30000007E9764661A.png" manifest:media-type=""/>
  <manifest:file-entry manifest:full-path="Pictures/10000201000000300000003E10A26BF8.png" manifest:media-type=""/>
  <manifest:file-entry manifest:full-path="Pictures/100002010000012D0000004932459E8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d4e7"/>
    </style:style>
    <style:style style:name="P2" style:family="paragraph" style:parent-style-name="Text_20_body">
      <style:paragraph-properties fo:text-align="end" style:justify-single-word="false" fo:padding="0.0201in" fo:border-left="none" fo:border-right="none" fo:border-top="0.06pt solid #000000" fo:border-bottom="0.06pt solid #000000" style:shadow="none"/>
      <style:text-properties fo:color="#000000" fo:letter-spacing="0.0193in" officeooo:paragraph-rsid="00154d3d"/>
    </style:style>
    <style:style style:name="P3" style:family="paragraph" style:parent-style-name="Text_20_body" style:master-page-name="Standard">
      <style:paragraph-properties fo:margin-top="0in" fo:margin-bottom="0.0402in" style:contextual-spacing="false" style:page-number="auto" style:shadow="none"/>
      <style:text-properties officeooo:paragraph-rsid="00154d3d"/>
    </style:style>
    <style:style style:name="T1" style:family="text">
      <style:text-properties officeooo:rsid="0007740a"/>
    </style:style>
    <style:style style:name="T2" style:family="text">
      <style:text-properties officeooo:rsid="00079b30"/>
    </style:style>
    <style:style style:name="T3" style:family="text">
      <style:text-properties officeooo:rsid="0008f004"/>
    </style:style>
    <style:style style:name="T4" style:family="text">
      <style:text-properties officeooo:rsid="000aeb01"/>
    </style:style>
    <style:style style:name="T5" style:family="text">
      <style:text-properties officeooo:rsid="000bd434"/>
    </style:style>
    <style:style style:name="T6" style:family="text">
      <style:text-properties officeooo:rsid="000dac41"/>
    </style:style>
    <style:style style:name="T7" style:family="text">
      <style:text-properties officeooo:rsid="000f0407"/>
    </style:style>
    <style:style style:name="T8" style:family="text">
      <style:text-properties officeooo:rsid="001314eb"/>
    </style:style>
    <style:style style:name="T9" style:family="text">
      <style:text-properties officeooo:rsid="0013447b"/>
    </style:style>
    <style:style style:name="T10" style:family="text">
      <style:text-properties fo:color="#000000" style:font-name="Arial2" fo:font-size="23.8999996185303pt" fo:font-weight="bold" style:font-name-asian="Arial2" style:font-size-asian="23.8999996185303pt" style:font-weight-asian="bold" style:font-name-complex="Arial2" style:font-size-complex="23.8999996185303pt" style:font-weight-complex="bold" style:text-scale="100%"/>
    </style:style>
    <style:style style:name="T11" style:family="text">
      <style:text-properties fo:color="#000000" fo:font-size="23.8999996185303pt" fo:font-weight="bold" style:font-size-asian="23.8999996185303pt" style:font-weight-asian="bold" style:font-size-complex="23.8999996185303pt" style:font-weight-complex="bold"/>
    </style:style>
    <style:style style:name="T12" style:family="text">
      <style:text-properties fo:font-size="22pt" fo:font-weight="bold" officeooo:rsid="00154d3d" style:font-size-asian="22pt" style:font-weight-asian="bold" style:font-size-complex="22pt" style:font-weight-complex="bold"/>
    </style:style>
    <style:style style:name="T13" style:family="text">
      <style:text-properties fo:font-size="23.8999996185303pt" fo:font-weight="bold" style:font-size-asian="23.8999996185303pt" style:font-weight-asian="bold" style:font-size-complex="23.8999996185303pt" style:font-weight-complex="bold"/>
    </style:style>
    <style:style style:name="T14" style:family="text">
      <style:text-properties officeooo:rsid="0016d4e7"/>
    </style:style>
    <style:style style:name="T15" style:family="text">
      <style:text-properties officeooo:rsid="00177c78"/>
    </style:style>
    <style:style style:name="T16" style:family="text">
      <style:text-properties officeooo:rsid="0017e78f"/>
    </style:style>
    <style:style style:name="T17" style:family="text">
      <style:text-properties officeooo:rsid="001b7f32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as-char" svg:y="-0.3543in" svg:width="0.4327in" svg:height="0.5575in" draw:z-index="0"><draw:image xlink:href="Pictures/10000201000000300000003E10A26BF8.png" xlink:type="simple" xlink:show="embed" xlink:actuate="onLoad"/></draw:frame> <text:span text:style-name="T11">The Children</text:span><text:span text:style-name="T10">’</text:span><text:span text:style-name="T11">s Reflexology Programme</text:span></text:p>
      <text:p text:style-name="P2"><text:span text:style-name="T12">PRESENTATION NOTES</text:span></text:p>
      <text:p text:style-name="Intro"><text:span text:style-name="T14">It is often useful to give a short presentation to a group of potential students, such as an NCT class or a WI meeting, so that they can find out more about The Children's Reflexology Programme. If you need to do this then you might find these notes useful as a guide. You can read them verbatim or use the highlighted keywords to guide you through a more free-form talk, depending on what suits you and the audience. You should illustrate your presentation </text:span><text:span text:style-name="T15">where possible, e.g. </text:span><text:span text:style-name="T14">using </text:span><text:span text:style-name="T16">your </text:span><text:span text:style-name="T14">teaching</text:span><text:span text:style-name="T15"> </text:span><text:span text:style-name="T14">material</text:span><text:span text:style-name="T15">s</text:span><text:span text:style-name="T14">. Add personal anecdotes from your own experiences for extra impact. Don't forget to start by introducing yourself and finish by thanking your audience and inviting them to ask questions. </text:span><text:span text:style-name="T15">Short demonstrations of the techniques always go down well at session</text:span><text:span text:style-name="T16">s</text:span><text:span text:style-name="T15"> like this.</text:span></text:p>
      <text:p text:style-name="P1"><text:span text:style-name="T8">(</text:span><text:span text:style-name="T3">I am </text:span>a parent <text:span text:style-name="T3">and</text:span><text:span text:style-name="T8">)</text:span> <text:span text:style-name="keywords"><text:span text:style-name="T8">I know</text:span></text:span><text:span text:style-name="T8"> well </text:span>that feeling of utter <text:span text:style-name="keywords">helplessness</text:span> that hits us <text:span text:style-name="keywords">when</text:span> our <text:span text:style-name="keywords">child is </text:span><text:span text:style-name="keywords"><text:span text:style-name="T3">distressed</text:span></text:span><text:span text:style-name="T3"> or </text:span>unwell with conditions that we may not consider worthy of a trip to the GP. <text:span text:style-name="T3">Of course it </text:span>still pains us to watch them suffer <text:span text:style-name="T3">and this is very </text:span><text:span text:style-name="keywords">dis-empowering for</text:span> us as parents <text:span text:style-name="T5">or </text:span><text:span text:style-name="keywords"><text:span text:style-name="T5">carers </text:span></text:span><text:span text:style-name="keywords">and</text:span> for our <text:span text:style-name="keywords">children too</text:span>, who naturally turn to us for answers and to take their pain and discomfort away.</text:p>
      <text:p text:style-name="Text_20_body"><text:span text:style-name="keywords">The Children's Reflexology Programme</text:span> is a <text:span text:style-name="T6">simple </text:span>course <text:span text:style-name="T6">of six, </text:span><text:span text:style-name="keywords"><text:span text:style-name="T6">one-hour sessions</text:span></text:span><text:span text:style-name="T6">, spread over </text:span><text:span text:style-name="keywords"><text:span text:style-name="T6">six weeks</text:span></text:span><text:span text:style-name="T6">. <text:s/>It is taught by fully </text:span><text:span text:style-name="keywords"><text:span text:style-name="T6">trained and insured Practitioners</text:span></text:span><text:span text:style-name="T6">. It </text:span>empowers parents and carers to be able to offer their children a <text:span text:style-name="keywords">non-invasive complementary therapy</text:span> at home at any time of the day or night, from someone they love and feel safe with. <text:span text:style-name="T3">The course shows you how to</text:span> <text:span text:style-name="keywords">treat specific conditions of childhood</text:span> <text:span text:style-name="T3">and includes a series of </text:span>handouts <text:span text:style-name="T3">in the form of</text:span> <text:span text:style-name="keywords">mini booklets</text:span> that can be <text:span text:style-name="T3">us</text:span>ed by a parent or carer, <text:span text:style-name="T9">as well as the delightful book, </text:span><text:span text:style-name="keywords"><text:span text:style-name="T9">The Mouse's House</text:span></text:span>. <text:span text:style-name="T5">A carefully designed series of </text:span><text:span text:style-name="keywords"><text:span text:style-name="T5">rhymes, pictures and stories</text:span></text:span><text:span text:style-name="T5"> is used to </text:span><text:span text:style-name="keywords"><text:span text:style-name="T5">engage</text:span></text:span><text:span text:style-name="T5"> the child and to help you to </text:span><text:span text:style-name="keywords"><text:span text:style-name="T5">learn and remember</text:span></text:span><text:span text:style-name="T5"> the reflexology.</text:span></text:p>
      <text:p text:style-name="Text_20_body"><text:span text:style-name="T5">All t</text:span>his <text:span text:style-name="keywords">empowers </text:span><text:span text:style-name="keywords"><text:span text:style-name="T3">you</text:span></text:span><text:span text:style-name="T3"> to </text:span>do something positive <text:span text:style-name="keywords">to help </text:span><text:span text:style-name="keywords"><text:span text:style-name="T3">you</text:span></text:span><text:span text:style-name="keywords">r child</text:span>. <text:span text:style-name="T3">It also helps your</text:span> child by <text:span text:style-name="keywords">strengthening the bond</text:span> they already feel for <text:span text:style-name="T3">you</text:span> and <text:span text:style-name="T3">strengthening </text:span>their belief in <text:span text:style-name="T3">you</text:span>. <text:span text:style-name="T4">This </text:span><text:span text:style-name="keywords"><text:span text:style-name="T4">gentle therapy</text:span></text:span><text:span text:style-name="T4"> offers families a valuable </text:span><text:span text:style-name="keywords"><text:span text:style-name="T4">relief from</text:span></text:span><text:span text:style-name="T4"> </text:span><text:span text:style-name="T16">some</text:span><text:span text:style-name="T4"> of the worst feelings a parent can experience, </text:span><text:span text:style-name="keywords"><text:span text:style-name="T4">powerlessness and helplessness</text:span></text:span><text:span text:style-name="T4">!</text:span></text:p>
      <text:p text:style-name="Text_20_body"><text:span text:style-name="keywords">Reflexology</text:span> is a powerful but <text:span text:style-name="keywords">gentle therapy</text:span> which is particularly <text:span text:style-name="keywords">beneficial with children</text:span> and can be a great help <text:span text:style-name="keywords">in times of distress</text:span> and with common childhood illnesses such as constipation, teething, colic and so on. Unfortunately it is <text:span text:style-name="keywords">not always practical to visit a reflexologist</text:span>, especially in the middle of the night! Also, a strange person in a strange place might not be the most helpful thing in these situations, which are <text:soft-page-break/>often very <text:span text:style-name="keywords">emotionally charged</text:span>, and might even be frightening for some children. Children who are unwell, or just distressed or upset for some reason, want to <text:span text:style-name="keywords">stay close to the people and places they know and love</text:span>.</text:p>
      <text:p text:style-name="Text_20_body">The Children's Reflexology Programme <text:span text:style-name="keywords"><text:span text:style-name="T1">solves all these problems</text:span></text:span><text:span text:style-name="T1"> by making it possible for you to </text:span><text:span text:style-name="keywords"><text:span text:style-name="T1">give reflexology treatments yourself</text:span></text:span><text:span text:style-name="T1">, whenever and wherever you want. You can start helping with everything </text:span><text:span text:style-name="keywords"><text:span text:style-name="T1">from tantrums to teething</text:span></text:span><text:span text:style-name="T1">, giving you precious </text:span><text:span text:style-name="keywords"><text:span text:style-name="T1">time to relax</text:span></text:span><text:span text:style-name="T1"> and take a step back so you can </text:span><text:span text:style-name="keywords"><text:span text:style-name="T1">decide what to do next</text:span></text:span><text:span text:style-name="T1"> – a visit to a reflexologist, a trip to the doctor, some more of your own treatments or perhaps </text:span><text:span text:style-name="keywords"><text:span text:style-name="T1">even just a cuddle</text:span></text:span><text:span text:style-name="T1"> is all that will be needed.</text:span></text:p>
      <text:p text:style-name="Text_20_body">The beauty of The Children's Reflexology Programme is that these <text:span text:style-name="keywords">treatments can be given </text:span><text:span text:style-name="keywords"><text:span text:style-name="T6">at </text:span></text:span><text:span text:style-name="keywords">any time</text:span> <text:span text:style-name="T6">and in any place</text:span>. Your child <text:span text:style-name="keywords">doesn't have to be ill</text:span> to give them any of the treatments. If your child suffers with constipation give them the <text:span text:style-name="keywords">treatment</text:span> for it <text:span text:style-name="keywords">every day</text:span> – they cannot have too much reflexology! <text:span text:style-name="T7">You can u</text:span>se the treatments as a way of <text:span text:style-name="T17">helping to manage</text:span> the condition and <text:span text:style-name="keywords">keeping your child calm, relaxed</text:span>, happy and well.</text:p>
      <text:p text:style-name="Text_20_body">The Children's Reflexology Programme <text:span text:style-name="T2">offers </text:span><text:span text:style-name="keywords"><text:span text:style-name="T2">parents and carers</text:span></text:span><text:span text:style-name="T2"> the opportunity to </text:span><text:span text:style-name="keywords"><text:span text:style-name="T2">learn enough reflexology</text:span></text:span><text:span text:style-name="T2"> to treat their family without having to spend thousands of pounds becoming qualified. It is a special </text:span><text:span text:style-name="keywords"><text:span text:style-name="T2">medicine cabinet for all your family</text:span></text:span><text:span text:style-name="T2"> that is completely </text:span><text:span text:style-name="keywords"><text:span text:style-name="T2">non-invasive</text:span></text:span><text:span text:style-name="T2">, that </text:span><text:span text:style-name="keywords"><text:span text:style-name="T2">no-one can overdose</text:span></text:span><text:span text:style-name="T2"> on, that will bring you all together with </text:span><text:span text:style-name="keywords"><text:span text:style-name="T2">love and respect</text:span></text:span><text:span text:style-name="T2"> through touch and </text:span><text:span text:style-name="keywords"><text:span text:style-name="T2">bonding</text:span></text:span><text:span text:style-name="T2"> and most importantly </text:span><text:span text:style-name="keywords"><text:span text:style-name="T2">empowers both parent/carer and child</text:span></text:span><text:span text:style-name="T2">. Win, win all round!</text:span></text:p>
      <text:p text:style-name="Text_20_body"><text:span text:style-name="keywords">The Children's Reflexology Programme </text:span><text:span text:style-name="keywords"><text:span text:style-name="T2">is unique.</text:span></text:span><text:span text:style-name="T2"> It has been specially created to engage children through the use of animals, rhymes and story. It is a </text:span><text:span text:style-name="keywords"><text:span text:style-name="T2">fun way of gathering</text:span></text:span><text:span text:style-name="T2"> together with friends, NCT groups and other parents and carers and spending time together. All the parents who have already attended a course have had </text:span><text:span text:style-name="keywords"><text:span text:style-name="T2">positive results after their first class</text:span></text:span><text:span text:style-name="T2">. Reflexology is a powerful tool and The Children's Reflexology Programme makes it </text:span><text:span text:style-name="keywords"><text:span text:style-name="T2">available to you, now</text:span></text:span><text:span text:style-name="T2">.</text:span></text:p>
      <text:p text:style-name="Text_20_body"><text:s/></text:p>
      <text:p text:style-name="Text_20_body"><draw:frame draw:style-name="fr2" draw:name="graphics2" text:anchor-type="paragraph" svg:x="0.0161in" svg:y="1.0709in" svg:width="2.1201in" svg:height="0.5146in" draw:z-index="1"><draw:image xlink:href="Pictures/100002010000012D0000004932459E89.png" xlink:type="simple" xlink:show="embed" xlink:actuate="onLoad"/></draw:frame><draw:frame draw:style-name="fr2" draw:name="graphics3" text:anchor-type="paragraph" svg:x="5.1654in" svg:y="0.302in" svg:width="1.5311in" svg:height="1.3126in" draw:z-index="2"><draw:image xlink:href="Pictures/10000201000000930000007E976466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.2598in" style:contextual-spacing="false" fo:line-height="120%" fo:orphans="3" fo:widows="3" style:page-number="auto" style:shadow="none"/>
      <style:text-properties fo:color="#666666"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" style:family="paragraph" style:parent-style-name="Caption" style:class="extra"/>
    <style:style style:name="Intro" style:family="paragraph" style:parent-style-name="Text_20_body">
      <style:paragraph-properties fo:padding="0.1in" fo:border="0.06pt solid #000000" style:shadow="none"/>
      <style:text-properties fo:color="#000000" fo:font-size="10pt" style:font-size-asian="10.5pt"/>
    </style:style>
    <style:style style:name="keywords" style:family="text">
      <style:text-properties fo:color="#000000" fo:font-size="13pt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22:00:24.97</meta:creation-date>
    <meta:generator>LibreOffice/3.6$Windows_x86 LibreOffice_project/e29a214-2bbed72-0621de6-a97528c-8f066d</meta:generator>
    <dc:date>2015-03-29T14:43:13.06</dc:date>
    <meta:editing-duration>PT2H46M4S</meta:editing-duration>
    <meta:editing-cycles>17</meta:editing-cycles>
    <meta:print-date>2015-03-29T14:36:16.11</meta:print-date>
    <meta:document-statistic meta:table-count="0" meta:image-count="3" meta:object-count="0" meta:page-count="2" meta:paragraph-count="12" meta:word-count="813" meta:character-count="4758" meta:non-whitespace-character-count="3952"/>
  </office:meta>
</office:document-meta>
</file>